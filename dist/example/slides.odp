
<file path=content.xml><?xml version="1.0" encoding="utf-8"?>
<office:document-content xmlns:office="urn:oasis:names:tc:opendocument:xmlns:office:1.0" xmlns:draw="urn:oasis:names:tc:opendocument:xmlns:drawing:1.0" xmlns:text="urn:oasis:names:tc:opendocument:xmlns:text:1.0" office:version="1.2">
  <office:body>
    <office:presentation>
      <draw:page draw:name="slide1">
        <draw:frame>
          <draw:text-box>
            <text:p>Flyfish Viewer ODP Sample</text:p>
            <text:p>Slide one checks OpenDocument presentation routing.</text:p>
          </draw:text-box>
        </draw:frame>
      </draw:page>
      <draw:page draw:name="slide2">
        <draw:frame>
          <draw:text-box>
            <text:p>第二页</text:p>
            <text:p>用于验证多页幻灯片文本提取。</text:p>
          </draw:text-box>
        </draw:frame>
      </draw:page>
    </office:presentation>
  </office:body>
</office:document-content>
</file>