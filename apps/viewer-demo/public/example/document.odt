
<file path=content.xml><?xml version="1.0" encoding="utf-8"?>
<office:document-content xmlns:office="urn:oasis:names:tc:opendocument:xmlns:office:1.0" xmlns:text="urn:oasis:names:tc:opendocument:xmlns:text:1.0" office:version="1.2">
  <office:body>
    <office:text>
      <text:h text:outline-level="1">Flyfish Viewer ODT Sample</text:h>
      <text:p>OpenDocument Text preview extracts content.xml and displays readable document blocks.</text:p>
      <text:p>中文段落用于验证 ODT 兼容预览、纸张背景和安全文本抽取。</text:p>
    </office:text>
  </office:body>
</office:document-content>
</file>